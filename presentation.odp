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BB8A913BCE8.png" manifest:media-type="image/png"/>
  <manifest:file-entry manifest:full-path="Pictures/1000000100000F00000008704E0466C6.png" manifest:media-type="image/png"/>
  <manifest:file-entry manifest:full-path="Pictures/10000001000007500000063687E60608.png" manifest:media-type="image/png"/>
  <manifest:file-entry manifest:full-path="Pictures/1000000100000F0000000870B306FCA4.png" manifest:media-type="image/png"/>
  <manifest:file-entry manifest:full-path="Pictures/1000000100000BB80000017E80EF1A6F.png" manifest:media-type="image/png"/>
  <manifest:file-entry manifest:full-path="Pictures/10000001000002800000019014214894.png" manifest:media-type="image/png"/>
  <manifest:file-entry manifest:full-path="Pictures/100000010000049200000474BE8ACD1C.png" manifest:media-type="image/png"/>
  <manifest:file-entry manifest:full-path="Pictures/1000570100002B9D00001F1C0F727385.svg" manifest:media-type="image/svg+xml"/>
  <manifest:file-entry manifest:full-path="Pictures/100046B500002B9D00001F3642666A4C.svg" manifest:media-type="image/svg+xml"/>
  <manifest:file-entry manifest:full-path="Pictures/10000001000001A60000012D7C496D0D.png" manifest:media-type="image/png"/>
  <manifest:file-entry manifest:full-path="Pictures/100000010000050000000198DD4D6887.png" manifest:media-type="image/png"/>
  <manifest:file-entry manifest:full-path="Pictures/10000001000001F4000000D05FDB3A8C.png" manifest:media-type="image/png"/>
  <manifest:file-entry manifest:full-path="Pictures/10000001000001A60000012EF26F6C53.png" manifest:media-type="image/png"/>
  <manifest:file-entry manifest:full-path="Pictures/10000001000009F50000021B7A4C0B9F.png" manifest:media-type="image/png"/>
  <manifest:file-entry manifest:full-path="Pictures/1000000100000190000000C8F52B71A3.png" manifest:media-type="image/png"/>
  <manifest:file-entry manifest:full-path="Pictures/1000000100000500000003F2C8719C74.png" manifest:media-type="image/png"/>
  <manifest:file-entry manifest:full-path="Pictures/10000001000004F20000019220BD67CF.png" manifest:media-type="image/png"/>
  <manifest:file-entry manifest:full-path="Pictures/1000000100001078000004285A9B1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7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1" style:family="paragraph">
      <style:paragraph-properties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2" style:family="paragraph">
      <style:paragraph-properties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1.77cm" svg:y="4.445cm" presentation:class="title" presentation:user-transformed="true">
          <draw:text-box>
            <text:p text:style-name="P1"><text:span text:style-name="T1">HashiCorp Packer</text:span></text:p>
          </draw:text-box>
        </draw:frame>
        <draw:frame draw:style-name="gr1" draw:text-style-name="P3" draw:layer="layout" svg:width="3.81cm" svg:height="1.907cm" svg:x="0.635cm" svg:y="0.0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8.89cm" svg:height="5.555cm" svg:x="9.555cm" svg:y="6.598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0.602cm" svg:y="1.984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Einführung in virtuelle Maschinen</text:p>
              </text:list-item>
              <text:list-item>
                <text:p text:style-name="P5">Virtuelle Maschinen vs. Golden Images</text:p>
              </text:list-item>
              <text:list-item>
                <text:p text:style-name="P5">Infrastructure as Code</text:p>
              </text:list-item>
              <text:list-item>
                <text:p text:style-name="P5">Einführung in HashiCorp Pack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inführung in virtuelle Maschinen</text:p>
          </draw:text-box>
        </draw:frame>
        <draw:frame draw:style-name="gr1" draw:text-style-name="P3" draw:layer="layout" svg:width="13.964cm" svg:height="9.96cm" svg:x="6.991cm" svg:y="3.1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oder Container</text:p>
          </draw:text-box>
        </draw:frame>
        <draw:frame draw:style-name="gr1" draw:text-style-name="P3" draw:layer="layout" svg:width="13.335cm" svg:height="9.543cm" svg:x="14.17cm" svg:y="3.441cm">
          <draw:image xlink:href="Pictures/100046B500002B9D00001F3642666A4C.svg" xlink:type="simple" xlink:show="embed" xlink:actuate="onLoad" draw:mime-type="image/svg+xml">
            <text:p/>
          </draw:image>
          <draw:image xlink:href="Pictures/10000001000001A60000012EF26F6C53.png" xlink:type="simple" xlink:show="embed" xlink:actuate="onLoad" draw:mime-type="image/png"/>
        </draw:frame>
        <draw:frame draw:style-name="gr1" draw:text-style-name="P3" draw:layer="layout" svg:width="13.354cm" svg:height="9.525cm" svg:x="0.4cm" svg:y="3.4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  <text:list-item>
                <text:p text:style-name="P5">Schnelles Testen neuer Technologi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6.985cm" svg:height="2.217cm" svg:x="1.27cm" svg:y="3.175cm">
          <draw:image xlink:href="Pictures/10000001000004F20000019220BD67CF.png" xlink:type="simple" xlink:show="embed" xlink:actuate="onLoad" draw:mime-type="image/png">
            <text:p/>
          </draw:image>
        </draw:frame>
        <draw:frame draw:style-name="gr1" draw:text-style-name="P3" draw:layer="layout" svg:width="8.292cm" svg:height="2.642cm" svg:x="1.233cm" svg:y="6.248cm">
          <draw:image xlink:href="Pictures/100000010000050000000198DD4D6887.png" xlink:type="simple" xlink:show="embed" xlink:actuate="onLoad" draw:mime-type="image/png">
            <text:p/>
          </draw:image>
        </draw:frame>
        <draw:frame draw:style-name="gr1" draw:text-style-name="P3" draw:layer="layout" svg:width="10.002cm" svg:height="2.114cm" svg:x="3.175cm" svg:y="10.795cm">
          <draw:image xlink:href="Pictures/10000001000009F50000021B7A4C0B9F.png" xlink:type="simple" xlink:show="embed" xlink:actuate="onLoad" draw:mime-type="image/png">
            <text:p/>
          </draw:image>
        </draw:frame>
        <draw:frame draw:style-name="gr1" draw:text-style-name="P3" draw:layer="layout" svg:width="5.356cm" svg:height="4.226cm" svg:x="22.225cm" svg:y="6.985cm">
          <draw:image xlink:href="Pictures/1000000100000500000003F2C8719C74.png" xlink:type="simple" xlink:show="embed" xlink:actuate="onLoad" draw:mime-type="image/png">
            <text:p/>
          </draw:image>
        </draw:frame>
        <draw:frame draw:style-name="gr1" draw:text-style-name="P3" draw:layer="layout" svg:width="5.238cm" svg:height="2.179cm" svg:x="16.51cm" svg:y="10.795cm">
          <draw:image xlink:href="Pictures/10000001000001F4000000D05FDB3A8C.png" xlink:type="simple" xlink:show="embed" xlink:actuate="onLoad" draw:mime-type="image/png">
            <text:p/>
          </draw:image>
        </draw:frame>
        <draw:frame draw:style-name="gr1" draw:text-style-name="P3" draw:layer="layout" svg:width="10.914cm" svg:height="2.754cm" svg:x="13.851cm" svg:y="2.961cm">
          <draw:image xlink:href="Pictures/1000000100001078000004285A9B12F9.png" xlink:type="simple" xlink:show="embed" xlink:actuate="onLoad" draw:mime-type="image/png">
            <text:p/>
          </draw:image>
        </draw:frame>
        <draw:frame draw:style-name="gr1" draw:text-style-name="P3" draw:layer="layout" svg:width="9.584cm" svg:height="1.22cm" svg:x="11.43cm" svg:y="7.035cm">
          <draw:image xlink:href="Pictures/1000000100000BB80000017E80EF1A6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10.754cm" svg:height="6.049cm" svg:x="8.255cm" svg:y="2.54cm">
          <draw:image xlink:href="Pictures/1000000100000F00000008704E0466C6.png" xlink:type="simple" xlink:show="embed" xlink:actuate="onLoad" draw:mime-type="image/png">
            <text:p/>
          </draw:image>
        </draw:frame>
        <draw:frame draw:style-name="gr1" draw:text-style-name="P3" draw:layer="layout" svg:width="5.589cm" svg:height="5.589cm" svg:x="2.666cm" svg:y="7.62cm">
          <draw:image xlink:href="Pictures/1000000100000BB800000BB8A913BCE8.png" xlink:type="simple" xlink:show="embed" xlink:actuate="onLoad" draw:mime-type="image/png">
            <text:p/>
          </draw:image>
        </draw:frame>
        <draw:frame draw:style-name="gr1" draw:text-style-name="P3" draw:layer="layout" svg:width="11.489cm" svg:height="6.462cm" svg:x="15.875cm" svg:y="6.985cm">
          <draw:image xlink:href="Pictures/1000000100000F0000000870B306FC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Virtuelle Maschinen vs. Golden Image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nfrastructure as Code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inführung in HashiCorp Packer</text:p>
          </draw:text-box>
        </draw:frame>
        <draw:frame draw:style-name="gr1" draw:text-style-name="P3" draw:layer="layout" svg:width="12.925cm" svg:height="10.978cm" svg:x="7.395cm" svg:y="2.54cm">
          <draw:image xlink:href="Pictures/10000001000007500000063687E6060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1H19M24S</meta:editing-duration>
    <meta:editing-cycles>3</meta:editing-cycles>
    <dc:date>2026-06-08T18:47:36.862002212</dc:date>
    <meta:document-statistic meta:object-count="113"/>
  </office:meta>
</office:document-meta>
</file>