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F4AAFB42DC.png" manifest:media-type="image/png"/>
  <manifest:file-entry manifest:full-path="Pictures/10000001000003F4000001EE03FD5739.png" manifest:media-type="image/png"/>
  <manifest:file-entry manifest:full-path="Pictures/1008C70E00007073000012B5CAF68A49.svg" manifest:media-type="image/svg+xml"/>
  <manifest:file-entry manifest:full-path="Pictures/1000000100000BB800000BB8A913BCE8.png" manifest:media-type="image/png"/>
  <manifest:file-entry manifest:full-path="Pictures/1000000100000F00000008704E0466C6.png" manifest:media-type="image/png"/>
  <manifest:file-entry manifest:full-path="Pictures/10000001000007500000063687E60608.png" manifest:media-type="image/png"/>
  <manifest:file-entry manifest:full-path="Pictures/1000000100000F0000000870B306FCA4.png" manifest:media-type="image/png"/>
  <manifest:file-entry manifest:full-path="Pictures/1000000100000BB80000017E80EF1A6F.png" manifest:media-type="image/png"/>
  <manifest:file-entry manifest:full-path="Pictures/10000001000002800000019014214894.png" manifest:media-type="image/png"/>
  <manifest:file-entry manifest:full-path="Pictures/1000000100000440000000B51969BFA4.png" manifest:media-type="image/png"/>
  <manifest:file-entry manifest:full-path="Pictures/100000010000049200000474BE8ACD1C.png" manifest:media-type="image/png"/>
  <manifest:file-entry manifest:full-path="Pictures/1000570100002B9D00001F1C0F727385.svg" manifest:media-type="image/svg+xml"/>
  <manifest:file-entry manifest:full-path="Pictures/100AE5C100007073000036E13DACD750.svg" manifest:media-type="image/svg+xml"/>
  <manifest:file-entry manifest:full-path="Pictures/100046B500002B9D00001F3642666A4C.svg" manifest:media-type="image/svg+xml"/>
  <manifest:file-entry manifest:full-path="Pictures/10000001000001A60000012D7C496D0D.png" manifest:media-type="image/png"/>
  <manifest:file-entry manifest:full-path="Pictures/100000010000050000000198DD4D6887.png" manifest:media-type="image/png"/>
  <manifest:file-entry manifest:full-path="Pictures/10000001000001F4000000D05FDB3A8C.png" manifest:media-type="image/png"/>
  <manifest:file-entry manifest:full-path="Pictures/10000001000001A60000012EF26F6C53.png" manifest:media-type="image/png"/>
  <manifest:file-entry manifest:full-path="Pictures/10000001000009F50000021B7A4C0B9F.png" manifest:media-type="image/png"/>
  <manifest:file-entry manifest:full-path="Pictures/1000000100000190000000C8F52B71A3.png" manifest:media-type="image/png"/>
  <manifest:file-entry manifest:full-path="Pictures/1000000100000500000003F2C8719C74.png" manifest:media-type="image/png"/>
  <manifest:file-entry manifest:full-path="Pictures/10000001000004F20000019220BD67CF.png" manifest:media-type="image/png"/>
  <manifest:file-entry manifest:full-path="Pictures/1000000100001078000004285A9B1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7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9" style:family="presentation" style:parent-style-name="_31__5f_Blue_5f_Curve1-outline1">
      <style:graphic-properties draw:textarea-horizontal-align="justify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</style:style>
    <style:style style:name="P6" style:family="paragraph"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50%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.901cm" svg:x="1.77cm" svg:y="2.804cm" presentation:class="title" presentation:user-transformed="true">
          <draw:text-box>
            <text:p text:style-name="P1"><text:span text:style-name="T1">Schulung</text:span><text:span text:style-name="T1"><text:line-break/></text:span><text:span text:style-name="T1">HashiCorp Packer</text:span></text:p>
          </draw:text-box>
        </draw:frame>
        <draw:frame draw:style-name="gr1" draw:text-style-name="P3" draw:layer="layout" svg:width="3.81cm" svg:height="1.907cm" svg:x="0.635cm" svg:y="0.0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5.685cm" svg:height="3.552cm" svg:x="11.43cm" svg:y="7.878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0.602cm" svg:y="1.984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Einführung in virtuelle Maschinen</text:p>
              </text:list-item>
              <text:list-item>
                <text:p text:style-name="P5">Virtuelle Maschinen vs. Golden Images</text:p>
              </text:list-item>
              <text:list-item>
                <text:p text:style-name="P5">Infrastructure as Code</text:p>
              </text:list-item>
              <text:list-item>
                <text:p text:style-name="P5">Einführung in HashiCorp Pack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inführung in virtuelle Maschinen</text:p>
          </draw:text-box>
        </draw:frame>
        <draw:frame draw:style-name="gr1" draw:text-style-name="P3" draw:layer="layout" svg:width="13.964cm" svg:height="9.96cm" svg:x="6.991cm" svg:y="3.1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oder Container</text:p>
          </draw:text-box>
        </draw:frame>
        <draw:frame draw:style-name="gr1" draw:text-style-name="P3" draw:layer="layout" svg:width="13.335cm" svg:height="9.543cm" svg:x="14.17cm" svg:y="3.441cm">
          <draw:image xlink:href="Pictures/100046B500002B9D00001F3642666A4C.svg" xlink:type="simple" xlink:show="embed" xlink:actuate="onLoad" draw:mime-type="image/svg+xml">
            <text:p/>
          </draw:image>
          <draw:image xlink:href="Pictures/10000001000001A60000012EF26F6C53.png" xlink:type="simple" xlink:show="embed" xlink:actuate="onLoad" draw:mime-type="image/png"/>
        </draw:frame>
        <draw:frame draw:style-name="gr1" draw:text-style-name="P3" draw:layer="layout" svg:width="13.354cm" svg:height="9.525cm" svg:x="0.4cm" svg:y="3.475cm">
          <draw:image xlink:href="Pictures/1000570100002B9D00001F1C0F727385.svg" xlink:type="simple" xlink:show="embed" xlink:actuate="onLoad" draw:mime-type="image/svg+xml">
            <text:p/>
          </draw:image>
          <draw:image xlink:href="Pictures/10000001000001A60000012D7C496D0D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 - Vorteil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Mehrere Betriebssysteme auf einer Hardware</text:p>
              </text:list-item>
              <text:list-item>
                <text:p text:style-name="P5">Effizientes Resourcesmanagement</text:p>
              </text:list-item>
              <text:list-item>
                <text:p text:style-name="P5">“Ephemeral environment”</text:p>
              </text:list-item>
              <text:list-item>
                <text:p text:style-name="P5">Reproduzierbare Umgebungen</text:p>
              </text:list-item>
              <text:list-item>
                <text:p text:style-name="P5">Schnelles Testen neuer Technologi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6.985cm" svg:height="2.217cm" svg:x="1.27cm" svg:y="3.175cm">
          <draw:image xlink:href="Pictures/10000001000004F20000019220BD67CF.png" xlink:type="simple" xlink:show="embed" xlink:actuate="onLoad" draw:mime-type="image/png">
            <text:p/>
          </draw:image>
        </draw:frame>
        <draw:frame draw:style-name="gr1" draw:text-style-name="P3" draw:layer="layout" svg:width="8.292cm" svg:height="2.642cm" svg:x="1.233cm" svg:y="6.248cm">
          <draw:image xlink:href="Pictures/100000010000050000000198DD4D6887.png" xlink:type="simple" xlink:show="embed" xlink:actuate="onLoad" draw:mime-type="image/png">
            <text:p/>
          </draw:image>
        </draw:frame>
        <draw:frame draw:style-name="gr1" draw:text-style-name="P3" draw:layer="layout" svg:width="10.002cm" svg:height="2.114cm" svg:x="3.175cm" svg:y="10.795cm">
          <draw:image xlink:href="Pictures/10000001000009F50000021B7A4C0B9F.png" xlink:type="simple" xlink:show="embed" xlink:actuate="onLoad" draw:mime-type="image/png">
            <text:p/>
          </draw:image>
        </draw:frame>
        <draw:frame draw:style-name="gr1" draw:text-style-name="P3" draw:layer="layout" svg:width="5.356cm" svg:height="4.226cm" svg:x="22.225cm" svg:y="6.985cm">
          <draw:image xlink:href="Pictures/1000000100000500000003F2C8719C74.png" xlink:type="simple" xlink:show="embed" xlink:actuate="onLoad" draw:mime-type="image/png">
            <text:p/>
          </draw:image>
        </draw:frame>
        <draw:frame draw:style-name="gr1" draw:text-style-name="P3" draw:layer="layout" svg:width="5.238cm" svg:height="2.179cm" svg:x="16.51cm" svg:y="10.795cm">
          <draw:image xlink:href="Pictures/10000001000001F4000000D05FDB3A8C.png" xlink:type="simple" xlink:show="embed" xlink:actuate="onLoad" draw:mime-type="image/png">
            <text:p/>
          </draw:image>
        </draw:frame>
        <draw:frame draw:style-name="gr1" draw:text-style-name="P3" draw:layer="layout" svg:width="10.914cm" svg:height="2.754cm" svg:x="13.851cm" svg:y="2.961cm">
          <draw:image xlink:href="Pictures/1000000100001078000004285A9B12F9.png" xlink:type="simple" xlink:show="embed" xlink:actuate="onLoad" draw:mime-type="image/png">
            <text:p/>
          </draw:image>
        </draw:frame>
        <draw:frame draw:style-name="gr1" draw:text-style-name="P3" draw:layer="layout" svg:width="9.584cm" svg:height="1.22cm" svg:x="11.43cm" svg:y="7.035cm">
          <draw:image xlink:href="Pictures/1000000100000BB80000017E80EF1A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rtuelle Maschinen</text:p>
          </draw:text-box>
        </draw:frame>
        <draw:frame draw:style-name="gr1" draw:text-style-name="P3" draw:layer="layout" svg:width="10.754cm" svg:height="6.049cm" svg:x="8.255cm" svg:y="2.54cm">
          <draw:image xlink:href="Pictures/1000000100000F00000008704E0466C6.png" xlink:type="simple" xlink:show="embed" xlink:actuate="onLoad" draw:mime-type="image/png">
            <text:p/>
          </draw:image>
        </draw:frame>
        <draw:frame draw:style-name="gr1" draw:text-style-name="P3" draw:layer="layout" svg:width="5.589cm" svg:height="5.589cm" svg:x="2.666cm" svg:y="7.62cm">
          <draw:image xlink:href="Pictures/1000000100000BB800000BB8A913BCE8.png" xlink:type="simple" xlink:show="embed" xlink:actuate="onLoad" draw:mime-type="image/png">
            <text:p/>
          </draw:image>
        </draw:frame>
        <draw:frame draw:style-name="gr1" draw:text-style-name="P3" draw:layer="layout" svg:width="11.489cm" svg:height="6.462cm" svg:x="15.875cm" svg:y="6.985cm">
          <draw:image xlink:href="Pictures/1000000100000F0000000870B306FC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Virtuelle Maschinen vs. Golden Images</text:p>
          </draw:text-box>
        </draw:frame>
        <draw:frame presentation:style-name="pr9" draw:text-style-name="P7" draw:layer="layout" svg:width="18.685cm" svg:height="10cm" svg:x="4.658cm" svg:y="2.875cm" presentation:class="outline" presentation:user-transformed="true">
          <draw:text-box>
            <text:p text:style-name="P6">In der Medienproduktion bezeichnet ein Gold-Image die endgültige Fassung eines Albums oder Films, nachdem alle Bearbeitungen, Schnitte und Abmischungen abgeschlossen wurden. Es handelt sich um die finale, fehlerfreie Version – daher der Begriff „gold“.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8">Virtuelle Maschinen vs. Golden Images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9"><text:span text:style-name="T2">Rollen, Gruppen und Userrechte konfigurieren</text:span></text:p>
              </text:list-item>
              <text:list-item>
                <text:p text:style-name="P9"><text:span text:style-name="T2">Automatisierte Systemupdates</text:span></text:p>
              </text:list-item>
              <text:list-item>
                <text:p text:style-name="P9"><text:span text:style-name="T2">Standardisierte Firewalls, Monitoring und Loggingsysteme</text:span></text:p>
              </text:list-item>
              <text:list-item>
                <text:p text:style-name="P9"><text:span text:style-name="T2">Nutzung des neusten Betriebssystems</text:span></text:p>
              </text:list-item>
              <text:list-item>
                <text:p text:style-name="P9"><text:span text:style-name="T2">Unternehmensrichtlinien einhalten</text:span></text:p>
                <text:p text:style-name="P9"><text:span text:style-name="T2"/></text:p>
                <text:p text:style-name="P9"><text:span text:style-name="T3">Ziel: Konsolidierung in eine Pipelin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8">Virtuelle Maschinen vs. Golden Images</text:p>
          </draw:text-box>
        </draw:frame>
        <draw:frame draw:style-name="gr3" draw:text-style-name="P8" draw:layer="layout" svg:width="24.13cm" svg:height="4.014cm" svg:x="1.905cm" svg:y="5.746cm">
          <draw:image xlink:href="Pictures/1008C70E00007073000012B5CAF68A49.svg" xlink:type="simple" xlink:show="embed" xlink:actuate="onLoad" draw:mime-type="image/svg+xml">
            <text:p/>
          </draw:image>
          <draw:image xlink:href="Pictures/1000000100000440000000B51969BFA4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8">Virtuelle Maschinen vs. Golden Images</text:p>
          </draw:text-box>
        </draw:frame>
        <draw:frame draw:style-name="gr3" draw:text-style-name="P8" draw:layer="layout" svg:width="24.13cm" svg:height="11.775cm" svg:x="1.905cm" svg:y="2.195cm">
          <draw:image xlink:href="Pictures/100AE5C100007073000036E13DACD750.svg" xlink:type="simple" xlink:show="embed" xlink:actuate="onLoad" draw:mime-type="image/svg+xml">
            <text:p/>
          </draw:image>
          <draw:image xlink:href="Pictures/10000001000003F4000001EE03FD5739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8">Virtuelle Maschinen vs. Golden Images</text:p>
          </draw:text-box>
        </draw:frame>
        <draw:frame draw:style-name="gr3" draw:text-style-name="P8" draw:layer="layout" svg:width="16.003cm" svg:height="8.89cm" svg:x="5.999cm" svg:y="3.43cm">
          <draw:image xlink:href="Pictures/1000000000000384000001F4AAFB42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8">Infrastructure as Cod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9"><text:span text:style-name="T2">Konfiguration wird in Dateien definiert</text:span></text:p>
              </text:list-item>
              <text:list-item>
                <text:p text:style-name="P9"><text:span text:style-name="T2">Integration mit Git</text:span></text:p>
              </text:list-item>
              <text:list-item>
                <text:p text:style-name="P9"><text:span text:style-name="T2">Dokumentation der Infrastruktur</text:span></text:p>
              </text:list-item>
              <text:list-item>
                <text:p text:style-name="P9"><text:span text:style-name="T2">Konsistenz, Sicherheit, Wiederholbarkeit und Nachverfolgbarkeit</text:span></text:p>
              </text:list-item>
              <text:list-item>
                <text:p text:style-name="P9"><text:span text:style-name="T2">Wiederverwendbarkeit von Skripten</text:span></text:p>
              </text:list-item>
              <text:list-item>
                <text:p text:style-name="P9"><text:span text:style-name="T2">Manuelle Schritte werden vollständig automatisie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1" draw:text-style-name="P3" draw:layer="layout" svg:width="17.779cm" svg:height="15.101cm" svg:x="5.111cm" svg:y="0.325cm">
          <draw:image xlink:href="Pictures/10000001000007500000063687E606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-background" style:display-name="1_Blue_Curve-background" style:family="presentation">
      <style:graphic-properties draw:stroke="none" draw:fill="none"/>
      <style:text-properties style:letter-kerning="true"/>
    </style:style>
    <style:style style:name="_31__5f_Blue_5f_Curve-backgroundobjects" style:display-name="1_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-notes" style:display-name="1_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-outline1" style:display-name="1_Blue_Curve-outline1" style:family="presentation">
      <style:graphic-properties draw:stroke="none" draw:fill="none" draw:auto-grow-height="false" draw:fit-to-size="false" style:shrink-to-fit="true" draw:shadow-color="#000000">
        <text:list-style style:name="_31__5f_Blue_5f_Curve-outline1" style:display-name="1_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-outline2" style:display-name="1_Blue_Curve-outline2" style:family="presentation" style:parent-style-name="_31__5f_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-outline3" style:display-name="1_Blue_Curve-outline3" style:family="presentation" style:parent-style-name="_31__5f_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-outline4" style:display-name="1_Blue_Curve-outline4" style:family="presentation" style:parent-style-name="_31__5f_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-outline5" style:display-name="1_Blue_Curve-outline5" style:family="presentation" style:parent-style-name="_31__5f_Blue_5f_Curve-outline4">
      <style:paragraph-properties fo:margin-left="0cm" fo:margin-right="0cm" fo:margin-top="0.074cm" fo:margin-bottom="0cm" fo:text-indent="0cm"/>
    </style:style>
    <style:style style:name="_31__5f_Blue_5f_Curve-outline6" style:display-name="1_Blue_Curve-outline6" style:family="presentation" style:parent-style-name="_31__5f_Blue_5f_Curve-outline5"/>
    <style:style style:name="_31__5f_Blue_5f_Curve-outline7" style:display-name="1_Blue_Curve-outline7" style:family="presentation" style:parent-style-name="_31__5f_Blue_5f_Curve-outline6"/>
    <style:style style:name="_31__5f_Blue_5f_Curve-outline8" style:display-name="1_Blue_Curve-outline8" style:family="presentation" style:parent-style-name="_31__5f_Blue_5f_Curve-outline7"/>
    <style:style style:name="_31__5f_Blue_5f_Curve-outline9" style:display-name="1_Blue_Curve-outline9" style:family="presentation" style:parent-style-name="_31__5f_Blue_5f_Curve-outline8"/>
    <style:style style:name="_31__5f_Blue_5f_Curve-subtitle" style:display-name="1_Blue_Curve-subtitle" style:family="presentation">
      <style:graphic-properties draw:stroke="none" draw:fill="none" draw:textarea-vertical-align="middle">
        <text:list-style style:name="_31__5f_Blue_5f_Curve-subtitle" style:display-name="1_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-title" style:display-name="1_Blue_Curve-title" style:family="presentation">
      <style:graphic-properties draw:stroke="none" draw:fill="none" draw:textarea-vertical-align="middle" draw:auto-grow-height="true">
        <text:list-style style:name="_31__5f_Blue_5f_Curve-title" style:display-name="1_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_31__5f_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1__5f_Blue_5f_Curve" style:display-name="1_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_31__5f_Blue_5f_Curve-title" draw:layer="backgroundobjects" svg:width="25cm" svg:height="3cm" svg:x="0cm" svg:y="4.5cm" presentation:class="title" presentation:placeholder="true">
        <draw:text-box/>
      </draw:frame>
      <draw:frame presentation:style-name="_31__5f_Blue_5f_Curve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-title" draw:layer="backgroundobjects" svg:width="17cm" svg:height="9.56cm" svg:x="2cm" svg:y="2.5cm" presentation:class="page"/>
        <draw:frame presentation:style-name="_31__5f_Blue_5f_Curv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presentation:footer/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page-number>17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1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1H28M19S</meta:editing-duration>
    <meta:editing-cycles>4</meta:editing-cycles>
    <dc:date>2026-06-09T16:59:05.945405590</dc:date>
    <meta:document-statistic meta:object-count="153"/>
  </office:meta>
</office:document-meta>
</file>