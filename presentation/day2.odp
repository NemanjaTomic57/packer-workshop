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4000001F4AAFB42DC.png" manifest:media-type="image/png"/>
  <manifest:file-entry manifest:full-path="Pictures/10000001000003D7000001512ABECB97.png" manifest:media-type="image/png"/>
  <manifest:file-entry manifest:full-path="Pictures/100000010000065A000001C471AF93A1.png" manifest:media-type="image/png"/>
  <manifest:file-entry manifest:full-path="Pictures/10000001000007CA000001E208D9A1B1.png" manifest:media-type="image/png"/>
  <manifest:file-entry manifest:full-path="Pictures/1000000100000688000002D23933D7AD.png" manifest:media-type="image/png"/>
  <manifest:file-entry manifest:full-path="Pictures/100000010000049200000474BE8ACD1C.png" manifest:media-type="image/png"/>
  <manifest:file-entry manifest:full-path="Pictures/10000001000002800000019014214894.png" manifest:media-type="image/png"/>
  <manifest:file-entry manifest:full-path="Pictures/10000001000003610000014BEAFA55B8.png" manifest:media-type="image/png"/>
  <manifest:file-entry manifest:full-path="Pictures/1000000100000190000000C8F52B71A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 loext:decorative="false"/>
    </style:style>
    <style:style style:name="pr1" style:family="presentation" style:parent-style-name="_31__5f_Blue_5f_Curve-title">
      <style:graphic-properties fo:min-height="3.901cm" loext:decorative="false"/>
      <style:paragraph-properties style:writing-mode="lr-tb"/>
    </style:style>
    <style:style style:name="pr2" style:family="presentation" style:parent-style-name="_31__5f_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_31__5f_Blue_5f_Curve1-title">
      <style:graphic-properties fo:min-height="1.328cm" loext:decorative="false"/>
      <style:paragraph-properties style:writing-mode="lr-tb"/>
    </style:style>
    <style:style style:name="pr4" style:family="presentation" style:parent-style-name="_31__5f_Blue_5f_Curve1-outline1">
      <style:graphic-properties fo:min-height="0.101cm" loext:decorative="false"/>
      <style:paragraph-properties style:writing-mode="lr-tb"/>
    </style:style>
    <style:style style:name="pr5" style:family="presentation" style:parent-style-name="_31__5f_Blue_5f_Curve1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style:paragraph-properties fo:margin-top="0cm" fo:margin-bottom="0cm" fo:line-height="150%" fo:text-align="center"/>
    </style:style>
    <style:style style:name="P2" style:family="paragraph">
      <style:paragraph-properties fo:margin-top="0cm" fo:margin-bottom="0cm" fo:line-height="150%" fo:text-align="center"/>
      <style:text-properties style:use-window-font-color="true" loext:opacity="0%" fo:font-weight="bold" fo:background-color="transparent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374cm" fo:margin-bottom="0cm" fo:line-height="150%" fo:text-indent="0cm"/>
    </style:style>
    <style:style style:name="P6" style:family="paragraph">
      <style:paragraph-properties fo:line-height="150%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50%" fo:text-align="start" fo:text-indent="0cm"/>
    </style:style>
    <style:style style:name="P9" style:family="paragraph">
      <style:paragraph-properties fo:line-height="150%" fo:text-align="start"/>
    </style:style>
    <style:style style:name="P10" style:family="paragraph">
      <loext:graphic-properties draw:fill="none" draw:fill-color="#ffffff"/>
    </style:style>
    <style:style style:name="T1" style:family="text">
      <style:text-properties style:use-window-font-color="true" loext:opacity="0%" fo:font-weight="bold" fo:background-color="transparent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Blue_5f_Curve" presentation:presentation-page-layout-name="AL1T19">
        <office:forms form:automatic-focus="false" form:apply-design-mode="false"/>
        <draw:frame presentation:style-name="pr1" draw:text-style-name="P2" draw:layer="layout" svg:width="25cm" svg:height="3.901cm" svg:x="1.77cm" svg:y="4.989cm" presentation:class="title" presentation:user-transformed="true">
          <draw:text-box>
            <text:p text:style-name="P1"><text:span text:style-name="T1">Schulung: HashiCorp Packer</text:span><text:span text:style-name="T1"><text:line-break/></text:span><text:span text:style-name="T1">Tag 2</text:span></text:p>
          </draw:text-box>
        </draw:frame>
        <draw:frame draw:style-name="gr1" draw:text-style-name="P3" draw:layer="layout" svg:width="3.81cm" svg:height="1.907cm" svg:x="0.635cm" svg:y="0.177cm">
          <draw:image xlink:href="Pictures/1000000100000190000000C8F52B71A3.png" xlink:type="simple" xlink:show="embed" xlink:actuate="onLoad" draw:mime-type="image/png">
            <text:p/>
          </draw:image>
        </draw:frame>
        <draw:frame draw:style-name="gr1" draw:text-style-name="P3" draw:layer="layout" svg:width="3.652cm" svg:height="2.282cm" svg:x="8.89cm" svg:y="0cm">
          <draw:image xlink:href="Pictures/10000001000002800000019014214894.png" xlink:type="simple" xlink:show="embed" xlink:actuate="onLoad" draw:mime-type="image/png">
            <text:p/>
          </draw:image>
        </draw:frame>
        <draw:frame draw:style-name="gr1" draw:text-style-name="P3" draw:layer="layout" svg:width="1.303cm" svg:height="1.27cm" svg:x="6.015cm" svg:y="0.635cm">
          <draw:image xlink:href="Pictures/100000010000049200000474BE8ACD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Agenda</text:p>
          </draw:text-box>
        </draw:frame>
        <draw:frame presentation:style-name="pr4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HashiCorp Configuration Language</text:p>
              </text:list-item>
              <text:list-item>
                <text:p text:style-name="P5">Dateien und Verzeichnisse</text:p>
              </text:list-item>
              <text:list-item>
                <text:p text:style-name="P6">Konfiguration von cloud-init</text:p>
              </text:list-item>
              <text:list-item>
                <text:p text:style-name="P6">Wichtige Source Block Parameter</text:p>
              </text:list-item>
              <text:list-item>
                <text:p text:style-name="P6"><text:span text:style-name="T2">LAB: Vollautomatisierte Installation einer VM mit cloud-init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7">HashiCorp Configuration Language</text:p>
          </draw:text-box>
        </draw:frame>
        <draw:frame presentation:style-name="pr4" draw:text-style-name="P6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8"><text:span text:style-name="T3">HashiCorp Configuration Language (HCL) oder JSON Format</text:span></text:p>
              </text:list-item>
              <text:list-item>
                <text:p text:style-name="P8"><text:span text:style-name="T3">Verschiedene Blöcke mit verschiedenen Funktionen</text:span></text:p>
                <text:list>
                  <text:list-item>
                    <text:p text:style-name="P9"><text:span text:style-name="T3">locals, variable</text:span></text:p>
                  </text:list-item>
                  <text:list-item>
                    <text:p text:style-name="P9"><text:span text:style-name="T3">packer, source, build</text:span></text:p>
                  </text:list-item>
                </text:list>
              </text:list-item>
              <text:list-item>
                <text:p text:style-name="P9"><text:span text:style-name="T3">Pfad Variablen</text:span></text:p>
              </text:list-item>
              <text:list-item>
                <text:p text:style-name="P9"><text:span text:style-name="T3">Funktionen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7">HashiCorp Configuration Language</text:p>
          </draw:text-box>
        </draw:frame>
        <draw:frame draw:style-name="gr1" draw:text-style-name="P3" draw:layer="layout" svg:width="27.259cm" svg:height="6.58cm" svg:x="0.372cm" svg:y="4.585cm">
          <draw:image xlink:href="Pictures/10000001000007CA000001E208D9A1B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7">HashiCorp Configuration Language</text:p>
          </draw:text-box>
        </draw:frame>
        <draw:frame draw:style-name="gr3" draw:text-style-name="P10" draw:layer="layout" svg:width="0.502cm" svg:height="1.195cm" svg:x="1.27cm" svg:y="3.175cm">
          <draw:text-box>
            <text:p/>
          </draw:text-box>
        </draw:frame>
        <draw:frame draw:style-name="gr1" draw:text-style-name="P3" draw:layer="layout" svg:width="26.322cm" svg:height="11.365cm" svg:x="0.839cm" svg:y="2.306cm">
          <draw:image xlink:href="Pictures/1000000100000688000002D23933D7A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7">HashiCorp Configuration Language</text:p>
          </draw:text-box>
        </draw:frame>
        <draw:frame draw:style-name="gr3" draw:text-style-name="P10" draw:layer="layout" svg:width="0.502cm" svg:height="1.195cm" svg:x="1.27cm" svg:y="3.175cm">
          <draw:text-box>
            <text:p/>
          </draw:text-box>
        </draw:frame>
        <draw:frame draw:style-name="gr1" draw:text-style-name="P3" draw:layer="layout" svg:width="22.882cm" svg:height="8.755cm" svg:x="2.559cm" svg:y="3.498cm">
          <draw:image xlink:href="Pictures/10000001000003610000014BEAFA55B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7">HashiCorp Configuration Language</text:p>
          </draw:text-box>
        </draw:frame>
        <draw:frame draw:style-name="gr3" draw:text-style-name="P10" draw:layer="layout" svg:width="0.502cm" svg:height="1.195cm" svg:x="1.27cm" svg:y="3.175cm">
          <draw:text-box>
            <text:p/>
          </draw:text-box>
        </draw:frame>
        <draw:frame draw:style-name="gr1" draw:text-style-name="P3" draw:layer="layout" svg:width="27.999cm" svg:height="7.782cm" svg:x="0.001cm" svg:y="3.984cm">
          <draw:image xlink:href="Pictures/100000010000065A000001C471AF93A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7">HashiCorp Configuration Language</text:p>
          </draw:text-box>
        </draw:frame>
        <draw:frame draw:style-name="gr3" draw:text-style-name="P10" draw:layer="layout" svg:width="0.502cm" svg:height="1.195cm" svg:x="1.27cm" svg:y="3.175cm">
          <draw:text-box>
            <text:p/>
          </draw:text-box>
        </draw:frame>
        <draw:frame draw:style-name="gr1" draw:text-style-name="P3" draw:layer="layout" svg:width="26.004cm" svg:height="8.914cm" svg:x="0.998cm" svg:y="3.418cm">
          <draw:image xlink:href="Pictures/10000001000003D7000001512ABECB9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7">Dateien und Verzeichnisse</text:p>
          </draw:text-box>
        </draw:frame>
        <draw:frame presentation:style-name="pr4" draw:text-style-name="P6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8"><text:span text:style-name="T3">Theoretisch ist Packer mit nur einer Datei ausführbar</text:span></text:p>
              </text:list-item>
              <text:list-item>
                <text:p text:style-name="P8"><text:span text:style-name="T3">Für automatisierte Installationen ist zusätzlich cloud-init notwendig</text:span></text:p>
              </text:list-item>
              <text:list-item>
                <text:p text:style-name="P8"><text:span text:style-name="T3">Output der VM Datei des jeweiligen Providers</text:span></text:p>
              </text:list-item>
              <text:list-item>
                <text:p text:style-name="P8"><text:span text:style-name="T3">Bei komplexen Projekten: Aufteilung in mehrere Dateien</text:span></text:p>
                <text:p text:style-name="P8"><text:span text:style-name="T3"/></text:p>
                <text:p text:style-name="P8"><text:span text:style-name="T4">Tipp: Open-source Projekte anschauen und verstehen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Agenda</text:p>
          </draw:text-box>
        </draw:frame>
        <draw:frame presentation:style-name="pr4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HashiCorp Configuration Language</text:p>
              </text:list-item>
              <text:list-item>
                <text:p text:style-name="P5">Dateien und Verzeichnisse</text:p>
              </text:list-item>
              <text:list-item>
                <text:p text:style-name="P6">Konfiguration von cloud-init</text:p>
              </text:list-item>
              <text:list-item>
                <text:p text:style-name="P6">Wichtige Source Block Parameter</text:p>
              </text:list-item>
              <text:list-item>
                <text:p text:style-name="P6"><text:span text:style-name="T2">LAB: Vollautomatisierte Installation einer VM mit cloud-ini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 text:style-name="P7">Konfiguration von cloud-init</text:p>
          </draw:text-box>
        </draw:frame>
        <draw:frame draw:style-name="gr1" draw:text-style-name="P3" draw:layer="layout" svg:width="16.003cm" svg:height="8.89cm" svg:x="5.999cm" svg:y="3.43cm">
          <draw:image xlink:href="Pictures/1000000000000384000001F4AAFB42D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1__5f_Blue_5f_Curve1-background" style:display-name="1_Blue_Curve1-background" style:family="presentation">
      <style:graphic-properties draw:stroke="none" draw:fill="none"/>
      <style:text-properties style:letter-kerning="true"/>
    </style:style>
    <style:style style:name="_31__5f_Blue_5f_Curve1-backgroundobjects" style:display-name="1_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_31__5f_Blue_5f_Curve1-notes" style:display-name="1_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lue_5f_Curve1-outline1" style:display-name="1_Blue_Curve1-outline1" style:family="presentation">
      <style:graphic-properties draw:stroke="none" draw:fill="none" draw:auto-grow-height="false" draw:fit-to-size="false" style:shrink-to-fit="false">
        <text:list-style style:name="_31__5f_Blue_5f_Curve1-outline1" style:display-name="1_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Blue_5f_Curve1-outline2" style:display-name="1_Blue_Curve1-outline2" style:family="presentation" style:parent-style-name="_31__5f_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_31__5f_Blue_5f_Curve1-outline3" style:display-name="1_Blue_Curve1-outline3" style:family="presentation" style:parent-style-name="_31__5f_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_31__5f_Blue_5f_Curve1-outline4" style:display-name="1_Blue_Curve1-outline4" style:family="presentation" style:parent-style-name="_31__5f_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_31__5f_Blue_5f_Curve1-outline5" style:display-name="1_Blue_Curve1-outline5" style:family="presentation" style:parent-style-name="_31__5f_Blue_5f_Curve1-outline4">
      <style:paragraph-properties fo:margin-left="0cm" fo:margin-right="0cm" fo:margin-top="0.074cm" fo:margin-bottom="0cm" fo:text-indent="0cm"/>
    </style:style>
    <style:style style:name="_31__5f_Blue_5f_Curve1-outline6" style:display-name="1_Blue_Curve1-outline6" style:family="presentation" style:parent-style-name="_31__5f_Blue_5f_Curve1-outline5"/>
    <style:style style:name="_31__5f_Blue_5f_Curve1-outline7" style:display-name="1_Blue_Curve1-outline7" style:family="presentation" style:parent-style-name="_31__5f_Blue_5f_Curve1-outline6"/>
    <style:style style:name="_31__5f_Blue_5f_Curve1-outline8" style:display-name="1_Blue_Curve1-outline8" style:family="presentation" style:parent-style-name="_31__5f_Blue_5f_Curve1-outline7"/>
    <style:style style:name="_31__5f_Blue_5f_Curve1-outline9" style:display-name="1_Blue_Curve1-outline9" style:family="presentation" style:parent-style-name="_31__5f_Blue_5f_Curve1-outline8"/>
    <style:style style:name="_31__5f_Blue_5f_Curve1-subtitle" style:display-name="1_Blue_Curve1-subtitle" style:family="presentation">
      <style:graphic-properties draw:stroke="none" draw:fill="none" draw:textarea-vertical-align="middle">
        <text:list-style style:name="_31__5f_Blue_5f_Curve1-subtitle" style:display-name="1_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lue_5f_Curve1-title" style:display-name="1_Blue_Curve1-title" style:family="presentation">
      <style:graphic-properties draw:stroke="none" draw:fill="none" draw:textarea-vertical-align="middle" draw:auto-grow-height="true">
        <text:list-style style:name="_31__5f_Blue_5f_Curve1-title" style:display-name="1_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1__5f_Blue_5f_Curve-background" style:display-name="1_Blue_Curve-background" style:family="presentation">
      <style:graphic-properties draw:stroke="none" draw:fill="none"/>
      <style:text-properties style:letter-kerning="true"/>
    </style:style>
    <style:style style:name="_31__5f_Blue_5f_Curve-backgroundobjects" style:display-name="1_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_31__5f_Blue_5f_Curve-notes" style:display-name="1_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lue_5f_Curve-outline1" style:display-name="1_Blue_Curve-outline1" style:family="presentation">
      <style:graphic-properties draw:stroke="none" draw:fill="none" draw:auto-grow-height="false" draw:fit-to-size="false" style:shrink-to-fit="true" draw:shadow-color="#000000">
        <text:list-style style:name="_31__5f_Blue_5f_Curve-outline1" style:display-name="1_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Blue_5f_Curve-outline2" style:display-name="1_Blue_Curve-outline2" style:family="presentation" style:parent-style-name="_31__5f_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_31__5f_Blue_5f_Curve-outline3" style:display-name="1_Blue_Curve-outline3" style:family="presentation" style:parent-style-name="_31__5f_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_31__5f_Blue_5f_Curve-outline4" style:display-name="1_Blue_Curve-outline4" style:family="presentation" style:parent-style-name="_31__5f_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_31__5f_Blue_5f_Curve-outline5" style:display-name="1_Blue_Curve-outline5" style:family="presentation" style:parent-style-name="_31__5f_Blue_5f_Curve-outline4">
      <style:paragraph-properties fo:margin-left="0cm" fo:margin-right="0cm" fo:margin-top="0.074cm" fo:margin-bottom="0cm" fo:text-indent="0cm"/>
    </style:style>
    <style:style style:name="_31__5f_Blue_5f_Curve-outline6" style:display-name="1_Blue_Curve-outline6" style:family="presentation" style:parent-style-name="_31__5f_Blue_5f_Curve-outline5"/>
    <style:style style:name="_31__5f_Blue_5f_Curve-outline7" style:display-name="1_Blue_Curve-outline7" style:family="presentation" style:parent-style-name="_31__5f_Blue_5f_Curve-outline6"/>
    <style:style style:name="_31__5f_Blue_5f_Curve-outline8" style:display-name="1_Blue_Curve-outline8" style:family="presentation" style:parent-style-name="_31__5f_Blue_5f_Curve-outline7"/>
    <style:style style:name="_31__5f_Blue_5f_Curve-outline9" style:display-name="1_Blue_Curve-outline9" style:family="presentation" style:parent-style-name="_31__5f_Blue_5f_Curve-outline8"/>
    <style:style style:name="_31__5f_Blue_5f_Curve-subtitle" style:display-name="1_Blue_Curve-subtitle" style:family="presentation">
      <style:graphic-properties draw:stroke="none" draw:fill="none" draw:textarea-vertical-align="middle">
        <text:list-style style:name="_31__5f_Blue_5f_Curve-subtitle" style:display-name="1_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lue_5f_Curve-title" style:display-name="1_Blue_Curve-title" style:family="presentation">
      <style:graphic-properties draw:stroke="none" draw:fill="none" draw:textarea-vertical-align="middle" draw:auto-grow-height="true">
        <text:list-style style:name="_31__5f_Blue_5f_Curve-title" style:display-name="1_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gr8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362cm" fo:min-width="27.501cm" draw:shadow="visible" draw:shadow-offset-x="0cm" draw:shadow-offset-y="0.03cm" draw:shadow-color="#009bdd" loext:decorative="false"/>
    </style:style>
    <style:style style:name="Mgr9" style:family="graphic" style:parent-style-name="standard">
      <style:graphic-properties draw:stroke="none" draw:fill="none" draw:fill-color="#ffffff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_31__5f_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_31__5f_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_31__5f_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_31__5f_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_31__5f_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_31__5f_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lue_5f_Curve1" style:display-name="1_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_31__5f_Blue_5f_Curve1-title" draw:layer="backgroundobjects" svg:width="26cm" svg:height="1.328cm" svg:x="1cm" svg:y="0.5cm" presentation:class="title" presentation:placeholder="true">
        <draw:text-box/>
      </draw:frame>
      <draw:frame presentation:style-name="_31__5f_Blue_5f_Curve1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_5f_Blue_5f_Curve1-title" draw:layer="backgroundobjects" svg:width="17cm" svg:height="9.56cm" svg:x="2cm" svg:y="2.5cm" presentation:class="page"/>
        <draw:frame presentation:style-name="_31__5f_Blue_5f_Curve1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lue_5f_Curve" style:display-name="1_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_31__5f_Blue_5f_Curve-title" draw:layer="backgroundobjects" svg:width="25cm" svg:height="3cm" svg:x="0cm" svg:y="4.5cm" presentation:class="title" presentation:placeholder="true">
        <draw:text-box/>
      </draw:frame>
      <draw:frame presentation:style-name="_31__5f_Blue_5f_Curve-outline1" draw:layer="backgroundobjects" svg:width="26cm" svg:height="4.5cm" svg:x="1cm" svg:y="8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_31__5f_Blue_5f_Curve-title" draw:layer="backgroundobjects" svg:width="17cm" svg:height="9.56cm" svg:x="2cm" svg:y="2.5cm" presentation:class="page"/>
        <draw:frame presentation:style-name="_31__5f_Blue_5f_Curve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9" draw:text-style-name="MP8" draw:layer="backgroundobjects" svg:width="25.199cm" svg:height="9.134cm" svg:x="1.4cm" svg:y="3.685cm">
        <draw:text-box>
          <text:p/>
        </draw:text-box>
      </draw:frame>
      <draw:frame presentation:style-name="Mpr13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13" draw:text-style-name="MP7" draw:layer="backgroundobjects" svg:width="8.875cm" svg:height="1.085cm" svg:x="9.576cm" svg:y="14.348cm" presentation:class="footer">
        <draw:text-box>
          <text:p text:style-name="MP6"><text:span text:style-name="MT2"><presentation:footer/></text:span></text:p>
        </draw:text-box>
      </draw:frame>
      <draw:frame presentation:style-name="Mpr13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8T14:43:31.945774913</meta:creation-date>
    <dc:description>This work is licensed under a Creative Commons 0 License.
It makes use of the works of kka_libo_design@ashisuto.co.jp.</dc:description>
    <meta:generator>LibreOffice/25.8.7.3$Linux_X86_64 LibreOffice_project/580$Build-3</meta:generator>
    <dc:title>Blue Curve</dc:title>
    <meta:editing-duration>PT7H26M27S</meta:editing-duration>
    <meta:editing-cycles>18</meta:editing-cycles>
    <dc:date>2026-06-16T15:08:24.143675066</dc:date>
    <meta:document-statistic meta:object-count="121"/>
  </office:meta>
</office:document-meta>
</file>